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b0ff5"/>
    </style:style>
    <style:style style:name="T1" style:family="text">
      <style:text-properties officeooo:rsid="000ad5ce"/>
    </style:style>
    <style:style style:name="T2" style:family="text">
      <style:text-properties officeooo:rsid="000b0ff5"/>
    </style:style>
    <style:style style:name="T3" style:family="text">
      <style:text-properties officeooo:rsid="000bf3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 text:c="49"/><text:span text:style-name="T1">RESUMO</text:span></text:h>
      <text:p text:style-name="Text_20_body"/>
      <text:p text:style-name="P1"><text:tab/><text:span text:style-name="T1">A Humanização tem sido uma questão muito discutida nos últimos anos, principalmente no que tange a assistência de Enfermagem,pelo fato de seus profissionais permanecerem mais tempo junto ao paciente. Assim este estudo teve como objetivo geral caracterizar as publicações sobre humanização da assistência de enfermagem, identificando-as conforme o ano de publicação, tipo produção cientifica, local de realização de pesquisa, delineamento do trabalho, revista pública e quanto ao número, </text:span><text:span text:style-name="T2">titulação e atuação profissional dos autores.</text:span></text:p>
      <text:p text:style-name="P1"><text:span text:style-name="T1"><text:tab/></text:span><text:span text:style-name="T2">No percurso metodológico optou-se por uma revisão de literatura integrativa. Após a coleta dos dados e análise das publicações, foi possível identificar que 25,4% foram publicadas no ano de 2009, sendo 99,2% constituídas por artigos e que 10,8% foram publicadas no Rio de Janeiro. A </text:span><text:span text:style-name="T3">R</text:span><text:span text:style-name="T2">evista </text:span><text:span text:style-name="T3">B</text:span><text:span text:style-name="T2">rasileira de </text:span><text:span text:style-name="T3">E</text:span><text:span text:style-name="T2">nfermagem </text:span><text:span text:style-name="T3">foi o período que teve 13,8% das publicações, com esse breve estudo conclui-se que, houve um aumento no número de publicações sobre a humanização da assistência de enfermagem, em diversas localidades do Brasil, por várias revistas brasileiras e que estas ocorrem mais, após a implantação da politica na humanização pelo SUS em 2003. Enfim, o estudo mostrou ainda que os artigos publicados destacam a importância de uma assistência humanizada ao paciente, para sua melhor recuperação e ampliam o melhor conhecimento dos leitores sobre a temática. 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5T18:58:39.247682217</meta:creation-date>
    <dc:date>2026-06-15T19:34:37.387613968</dc:date>
    <meta:editing-duration>PT29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209" meta:character-count="1452" meta:non-whitespace-character-count="1193"/>
  </office:meta>
</office:document-meta>
</file>